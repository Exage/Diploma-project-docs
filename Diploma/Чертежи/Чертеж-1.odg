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14A000000DF7FCC36A26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844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text-properties style:font-name="Times New Roman"/>
    </style:style>
    <style:style style:name="P4" style:family="paragraph">
      <style:paragraph-properties fo:margin-left="0cm" fo:margin-right="0cm" fo:margin-top="0cm" fo:margin-bottom="0cm" fo:line-height="120%" fo:text-align="left" fo:text-indent="0cm"/>
    </style:style>
    <style:style style:name="P5" style:family="paragraph">
      <loext:graphic-properties draw:fill="none"/>
      <style:text-properties style:font-name="Times New Roman\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style:paragraph-properties fo:margin-left="0.85cm" fo:margin-right="0.598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.85cm" fo:margin-right="0.598cm" fo:margin-top="0cm" fo:margin-bottom="0cm" fo:line-height="120%" fo:text-align="center" fo:text-indent="0cm"/>
      <style:text-properties style:font-name="Times New Roman"/>
    </style:style>
    <style:style style:name="P9" style:family="paragraph">
      <style:paragraph-properties fo:margin-left="-0.113cm" fo:margin-right="-0.035cm" fo:margin-top="0cm" fo:margin-bottom="0cm" fo:line-height="120%" fo:text-align="center" fo:text-indent="0cm"/>
    </style:style>
    <style:style style:name="P10" style:family="paragraph"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font-name="Times New Roman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\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Times New Roman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Times New Roman" fo:font-size="23pt" fo:font-style="italic" style:font-name-asian="Arial" style:font-size-asian="23pt" style:font-style-asian="italic" style:font-name-complex="Arial" style:font-size-complex="23pt" style:font-style-complex="italic"/>
    </style:style>
    <style:style style:name="T5" style:family="text">
      <style:text-properties fo:color="#000000" loext:opacity="100%" style:font-name="Times New Roman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loext:opacity="100%" style:font-name="Times New Roman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Times New Roman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8" style:family="text">
      <style:text-properties fo:color="#000000" loext:opacity="100%" style:font-name="ISOCPEUR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9" style:family="text">
      <style:text-properties fo:color="#000000" loext:opacity="100%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10" style:family="text">
      <style:text-properties fo:color="#000000" loext:opacity="100%" style:font-name="Times New Roman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1" style:family="text">
      <style:text-properties fo:color="#000000" loext:opacity="100%" style:font-name="ISOCPEUR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2" style:family="text">
      <style:text-properties fo:color="#000000" loext:opacity="100%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3" style:family="text">
      <style:text-properties fo:color="#000000" loext:opacity="100%" fo:font-size="7pt" fo:font-style="italic" style:font-name-asian="ISOCPEUR" style:font-size-asian="7pt" style:font-style-asian="italic" style:font-name-complex="ISOCPEUR" style:font-size-complex="7pt" style:font-style-complex="italic"/>
    </style:style>
    <style:style style:name="T14" style:family="text">
      <style:text-properties fo:color="#000000" loext:opacity="100%" style:font-name="Times New Roman" fo:font-size="7pt" fo:font-style="italic" style:font-name-asian="ISOCPEUR" style:font-size-asian="7pt" style:font-style-asian="italic" style:font-name-complex="ISOCPEUR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" draw:style-name="dp1" draw:master-page-name="PM0">
        <draw:g draw:style-name="gr1">
          <draw:line draw:style-name="gr2" draw:text-style-name="P1" draw:layer="layout" svg:x1="2.012cm" svg:y1="0.4cm" svg:x2="2.012cm" svg:y2="58.899cm">
            <text:p/>
          </draw:line>
          <draw:frame draw:style-name="gr3" draw:text-style-name="P1" draw:layer="layout" svg:width="58.5cm" svg:height="1.219cm" draw:transform="rotate (-1.5707963267949) translate (2.6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0.4cm" svg:x2="83.512cm" svg:y2="0.4cm">
            <text:p/>
          </draw:line>
          <draw:frame draw:style-name="gr3" draw:text-style-name="P1" draw:layer="layout" svg:width="81.5cm" svg:height="1.219cm" svg:x="2.012cm" svg:y="-0.209cm">
            <draw:text-box>
              <text:p/>
            </draw:text-box>
          </draw:frame>
        </draw:g>
        <draw:g draw:style-name="gr1">
          <draw:line draw:style-name="gr2" draw:text-style-name="P1" draw:layer="layout" svg:x1="83.512cm" svg:y1="0.4cm" svg:x2="83.512cm" svg:y2="58.9cm">
            <text:p/>
          </draw:line>
          <draw:frame draw:style-name="gr3" draw:text-style-name="P1" draw:layer="layout" svg:width="58.5cm" svg:height="1.219cm" draw:transform="rotate (-1.5707963267949) translate (84.1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58.9cm" svg:x2="83.499cm" svg:y2="58.9cm">
            <text:p/>
          </draw:line>
          <draw:frame draw:style-name="gr3" draw:text-style-name="P1" draw:layer="layout" svg:width="81.488cm" svg:height="1.219cm" svg:x="2.012cm" svg:y="58.291cm">
            <draw:text-box>
              <text:p/>
            </draw:text-box>
          </draw:frame>
        </draw:g>
        <draw:line draw:style-name="gr2" draw:text-style-name="P1" draw:layer="layout" svg:x1="83.512cm" svg:y1="54.86cm" svg:x2="65cm" svg:y2="54.86cm">
          <text:p/>
        </draw:line>
        <draw:line draw:style-name="gr2" draw:text-style-name="P1" draw:layer="layout" svg:x1="65cm" svg:y1="54.86cm" svg:x2="65cm" svg:y2="58.859cm">
          <text:p/>
        </draw:line>
        <draw:line draw:style-name="gr4" draw:text-style-name="P1" draw:layer="layout" svg:x1="65cm" svg:y1="55.36cm" svg:x2="71.5cm" svg:y2="55.36cm">
          <text:p/>
        </draw:line>
        <draw:line draw:style-name="gr4" draw:text-style-name="P1" draw:layer="layout" svg:x1="65cm" svg:y1="55.86cm" svg:x2="71.5cm" svg:y2="55.86cm">
          <text:p/>
        </draw:line>
        <draw:line draw:style-name="gr2" draw:text-style-name="P1" draw:layer="layout" svg:x1="65cm" svg:y1="55.86cm" svg:x2="71.5cm" svg:y2="55.86cm">
          <text:p/>
        </draw:line>
        <draw:line draw:style-name="gr2" draw:text-style-name="P1" draw:layer="layout" svg:x1="65cm" svg:y1="56.36cm" svg:x2="71.5cm" svg:y2="56.36cm">
          <text:p/>
        </draw:line>
        <draw:line draw:style-name="gr4" draw:text-style-name="P1" draw:layer="layout" svg:x1="65cm" svg:y1="56.86cm" svg:x2="71.5cm" svg:y2="56.86cm">
          <text:p/>
        </draw:line>
        <draw:line draw:style-name="gr4" draw:text-style-name="P1" draw:layer="layout" svg:x1="65cm" svg:y1="57.36cm" svg:x2="71.5cm" svg:y2="57.36cm">
          <text:p/>
        </draw:line>
        <draw:line draw:style-name="gr4" draw:text-style-name="P1" draw:layer="layout" svg:x1="65cm" svg:y1="57.86cm" svg:x2="71.5cm" svg:y2="57.86cm">
          <text:p/>
        </draw:line>
        <draw:line draw:style-name="gr4" draw:text-style-name="P1" draw:layer="layout" svg:x1="65cm" svg:y1="58.36cm" svg:x2="71.5cm" svg:y2="58.36cm">
          <text:p/>
        </draw:line>
        <draw:line draw:style-name="gr2" draw:text-style-name="P1" draw:layer="layout" svg:x1="71.5cm" svg:y1="54.86cm" svg:x2="71.5cm" svg:y2="58.86cm">
          <text:p/>
        </draw:line>
        <draw:line draw:style-name="gr2" draw:text-style-name="P1" draw:layer="layout" svg:x1="71.5cm" svg:y1="54.86cm" svg:x2="83.5cm" svg:y2="54.86cm">
          <text:p/>
        </draw:line>
        <draw:line draw:style-name="gr2" draw:text-style-name="P1" draw:layer="layout" svg:x1="71.5cm" svg:y1="56.36cm" svg:x2="83.5cm" svg:y2="56.36cm">
          <text:p/>
        </draw:line>
        <draw:line draw:style-name="gr2" draw:text-style-name="P1" draw:layer="layout" svg:x1="78.5cm" svg:y1="56.36cm" svg:x2="78.5cm" svg:y2="58.859cm">
          <text:p/>
        </draw:line>
        <draw:line draw:style-name="gr2" draw:text-style-name="P1" draw:layer="layout" svg:x1="78.5cm" svg:y1="57.36cm" svg:x2="83.5cm" svg:y2="57.36cm">
          <text:p/>
        </draw:line>
        <draw:line draw:style-name="gr2" draw:text-style-name="P1" draw:layer="layout" svg:x1="81.5cm" svg:y1="56.38cm" svg:x2="81.5cm" svg:y2="57.36cm">
          <text:p/>
        </draw:line>
        <draw:line draw:style-name="gr2" draw:text-style-name="P1" draw:layer="layout" svg:x1="78.5cm" svg:y1="56.86cm" svg:x2="83.5cm" svg:y2="56.86cm">
          <text:p/>
        </draw:line>
        <draw:line draw:style-name="gr2" draw:text-style-name="P1" draw:layer="layout" svg:x1="80cm" svg:y1="56.36cm" svg:x2="80cm" svg:y2="57.36cm">
          <text:p/>
        </draw:line>
        <draw:line draw:style-name="gr2" draw:text-style-name="P1" draw:layer="layout" svg:x1="66.7cm" svg:y1="54.86cm" svg:x2="66.7cm" svg:y2="58.859cm">
          <text:p/>
        </draw:line>
        <draw:line draw:style-name="gr2" draw:text-style-name="P1" draw:layer="layout" svg:x1="69cm" svg:y1="54.86cm" svg:x2="69cm" svg:y2="58.86cm">
          <text:p/>
        </draw:line>
        <draw:line draw:style-name="gr2" draw:text-style-name="P1" draw:layer="layout" svg:x1="70.5cm" svg:y1="54.86cm" svg:x2="70.5cm" svg:y2="58.86cm">
          <text:p/>
        </draw:line>
        <draw:line draw:style-name="gr2" draw:text-style-name="P1" draw:layer="layout" svg:x1="65.74cm" svg:y1="54.86cm" svg:x2="65.74cm" svg:y2="56.36cm">
          <text:p/>
        </draw:line>
        <draw:frame draw:style-name="gr5" draw:text-style-name="P3" draw:layer="layout" svg:width="1.5cm" svg:height="0.705cm" svg:x="78.5cm" svg:y="56.257cm">
          <draw:text-box>
            <text:p text:style-name="P2"><text:span text:style-name="T1">Лит.</text:span></text:p>
          </draw:text-box>
        </draw:frame>
        <draw:frame draw:style-name="gr5" draw:text-style-name="P3" draw:layer="layout" svg:width="2cm" svg:height="0.705cm" svg:x="81.5cm" svg:y="56.257cm">
          <draw:text-box>
            <text:p text:style-name="P2"><text:span text:style-name="T1">Листов</text:span></text:p>
          </draw:text-box>
        </draw:frame>
        <draw:line draw:style-name="gr4" draw:text-style-name="P1" draw:layer="layout" svg:x1="79cm" svg:y1="56.86cm" svg:x2="79cm" svg:y2="57.36cm">
          <text:p/>
        </draw:line>
        <draw:line draw:style-name="gr4" draw:text-style-name="P1" draw:layer="layout" svg:x1="79.5cm" svg:y1="56.86cm" svg:x2="79.5cm" svg:y2="57.36cm">
          <text:p/>
        </draw:line>
        <draw:frame draw:style-name="gr5" draw:text-style-name="P3" draw:layer="layout" svg:width="1.5cm" svg:height="0.705cm" svg:x="78.5cm" svg:y="56.757cm">
          <draw:text-box>
            <text:p text:style-name="P4"><text:span text:style-name="T1">Д</text:span></text:p>
          </draw:text-box>
        </draw:frame>
        <draw:frame draw:style-name="gr5" draw:text-style-name="P3" draw:layer="layout" svg:width="1.5cm" svg:height="0.705cm" svg:x="80cm" svg:y="56.257cm">
          <draw:text-box>
            <text:p text:style-name="P2"><text:span text:style-name="T1">Лист</text:span></text:p>
          </draw:text-box>
        </draw:frame>
        <draw:frame draw:style-name="gr5" draw:text-style-name="P5" draw:layer="layout" svg:width="2.1cm" svg:height="0.705cm" svg:x="81.493cm" svg:y="56.757cm">
          <draw:text-box>
            <text:p text:style-name="P2"><text:span text:style-name="T2">1</text:span></text:p>
          </draw:text-box>
        </draw:frame>
        <draw:frame draw:style-name="gr6" draw:text-style-name="P3" draw:layer="layout" svg:width="7cm" svg:height="2.5cm" svg:x="71.493cm" svg:y="56.36cm">
          <draw:text-box>
            <text:p text:style-name="P6"><text:span text:style-name="T3">Проектирование и реализация клиент-серверного приложения для электронной коммерции</text:span></text:p>
            <text:p text:style-name="P6"><text:span text:style-name="T3">Схема алгоритма программы </text:span></text:p>
          </draw:text-box>
        </draw:frame>
        <draw:frame draw:style-name="gr7" draw:text-style-name="P8" draw:layer="layout" svg:width="12.1cm" svg:height="2.126cm" svg:x="71.197cm" svg:y="54.706cm">
          <draw:text-box>
            <text:p text:style-name="P7"><text:span text:style-name="T4">ДП.АС64.220038-06 93-00</text:span></text:p>
            <text:p text:style-name="P2"><text:span text:style-name="T5"/></text:p>
          </draw:text-box>
        </draw:frame>
        <draw:frame draw:style-name="gr8" draw:text-style-name="P3" draw:layer="layout" svg:width="5.075cm" svg:height="1.5cm" svg:x="78.467cm" svg:y="57.36cm">
          <draw:text-box>
            <text:p text:style-name="P9"><text:span text:style-name="T6">УО БрГТУ</text:span></text:p>
          </draw:text-box>
        </draw:frame>
        <draw:frame draw:style-name="gr5" draw:text-style-name="P1" draw:layer="layout" svg:width="1.5cm" svg:height="0.705cm" svg:x="65.697cm" svg:y="55.756cm">
          <draw:text-box>
            <text:p text:style-name="P4"><text:span text:style-name="T7">Лист</text:span></text:p>
          </draw:text-box>
        </draw:frame>
        <draw:frame draw:style-name="gr5" draw:text-style-name="P1" draw:layer="layout" svg:width="2.3cm" svg:height="0.71cm" svg:x="66.693cm" svg:y="55.754cm">
          <draw:text-box>
            <text:p text:style-name="P4"><text:span text:style-name="T8">№ </text:span><text:span text:style-name="T7">докум</text:span><text:span text:style-name="T8">.</text:span></text:p>
          </draw:text-box>
        </draw:frame>
        <draw:frame draw:style-name="gr5" draw:text-style-name="P11" draw:layer="layout" svg:width="1.8cm" svg:height="0.705cm" svg:x="68.947cm" svg:y="55.756cm">
          <draw:text-box>
            <text:p text:style-name="P10"><text:span text:style-name="T9">Подпись</text:span></text:p>
          </draw:text-box>
        </draw:frame>
        <draw:frame draw:style-name="gr5" draw:text-style-name="P1" draw:layer="layout" svg:width="1.157cm" svg:height="0.705cm" svg:x="70.441cm" svg:y="55.756cm">
          <draw:text-box>
            <text:p text:style-name="P4"><text:span text:style-name="T7">Дата</text:span></text:p>
          </draw:text-box>
        </draw:frame>
        <draw:frame draw:style-name="gr9" draw:text-style-name="P1" draw:layer="layout" svg:width="1.66cm" svg:height="0.755cm" svg:x="65.033cm" svg:y="56.232cm">
          <draw:text-box>
            <text:p text:style-name="P4"><text:span text:style-name="T10">Разраб</text:span><text:span text:style-name="T11">.</text:span></text:p>
          </draw:text-box>
        </draw:frame>
        <draw:frame draw:style-name="gr9" draw:text-style-name="P3" draw:layer="layout" svg:width="1.66cm" svg:height="0.749cm" svg:x="65.033cm" svg:y="56.735cm">
          <draw:text-box>
            <text:p text:style-name="P10"><text:span text:style-name="T10">Пров.</text:span></text:p>
          </draw:text-box>
        </draw:frame>
        <draw:frame draw:style-name="gr9" draw:text-style-name="P3" draw:layer="layout" svg:width="1.8cm" svg:height="0.749cm" svg:x="65cm" svg:y="57.736cm">
          <draw:text-box>
            <text:p text:style-name="P10"><text:span text:style-name="T10">Н.контр.</text:span></text:p>
          </draw:text-box>
        </draw:frame>
        <draw:frame draw:style-name="gr9" draw:text-style-name="P11" draw:layer="layout" svg:width="1.64cm" svg:height="0.749cm" svg:x="65.033cm" svg:y="58.235cm">
          <draw:text-box>
            <text:p text:style-name="P10"><text:span text:style-name="T12">Утв.</text:span></text:p>
          </draw:text-box>
        </draw:frame>
        <draw:frame draw:style-name="gr10" draw:text-style-name="P1" draw:layer="layout" svg:width="0.7cm" svg:height="0.5cm" svg:x="65.013cm" svg:y="55.86cm">
          <draw:text-box>
            <text:p text:style-name="P2"><text:span text:style-name="T7">Изм</text:span><text:span text:style-name="T8">.</text:span></text:p>
          </draw:text-box>
        </draw:frame>
        <draw:frame draw:style-name="gr11" draw:text-style-name="P11" draw:layer="layout" svg:width="2.3cm" svg:height="0.613cm" svg:x="66.67cm" svg:y="56.829cm">
          <draw:text-box>
            <text:p text:style-name="P10"><text:span text:style-name="T13">Войцехович Г.Ю.</text:span></text:p>
          </draw:text-box>
        </draw:frame>
        <draw:frame draw:style-name="gr11" draw:text-style-name="P3" draw:layer="layout" svg:width="2.3cm" svg:height="0.613cm" svg:x="66.69cm" svg:y="58.31cm">
          <draw:text-box>
            <text:p text:style-name="P10"><text:span text:style-name="T14">Головко В.А.</text:span></text:p>
          </draw:text-box>
        </draw:frame>
        <draw:frame draw:style-name="gr11" draw:text-style-name="P11" draw:layer="layout" svg:width="2.3cm" svg:height="0.613cm" svg:x="66.69cm" svg:y="57.823cm">
          <draw:text-box>
            <text:p text:style-name="P10"><text:span text:style-name="T13">Войцехович Г.Ю.</text:span></text:p>
          </draw:text-box>
        </draw:frame>
        <draw:frame draw:style-name="gr5" draw:text-style-name="P3" draw:layer="layout" svg:width="1.5cm" svg:height="0.705cm" svg:x="80cm" svg:y="56.747cm">
          <draw:text-box>
            <text:p text:style-name="P2"><text:span text:style-name="T1">1</text:span></text:p>
          </draw:text-box>
        </draw:frame>
        <draw:frame draw:style-name="gr11" draw:text-style-name="P3" draw:layer="layout" svg:width="2.3cm" svg:height="0.613cm" svg:x="66.675cm" svg:y="56.319cm">
          <draw:text-box>
            <text:p text:style-name="P10"><text:span text:style-name="T14">Горкавчук Н.М.</text:span></text:p>
          </draw:text-box>
        </draw:frame>
        <draw:frame draw:style-name="gr12" draw:text-style-name="P12" draw:layer="layout" svg:width="75.209cm" svg:height="50.922cm" svg:x="5.118cm" svg:y="2.222cm">
          <draw:image xlink:href="Pictures/10000001000014A000000DF7FCC36A2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5T13:36:04.505630000</dc:date>
    <meta:creation-date>2025-06-15T23:04:46Z</meta:creation-date>
    <meta:generator>LibreOffice/26.2.4.2$MacOSX_AARCH64 LibreOffice_project/0229ac93fcf0d7cbc6376066c6f35021cef002dc</meta:generator>
    <meta:editing-duration>PT34M6S</meta:editing-duration>
    <meta:editing-cycles>25</meta:editing-cycles>
    <meta:print-date>2026-06-06T15:59:08.353657800</meta:print-date>
    <meta:printed-by>Файлы PDF</meta:printed-by>
    <meta:document-statistic meta:object-count="59"/>
  </office:meta>
</office:document-meta>
</file>